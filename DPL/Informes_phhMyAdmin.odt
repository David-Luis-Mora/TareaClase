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E00000282B8E4B65A1D64E025.png" manifest:media-type="image/png"/>
  <manifest:file-entry manifest:full-path="Pictures/10000000000003FB00000240D4BE11771CE37B0F.png" manifest:media-type="image/png"/>
  <manifest:file-entry manifest:full-path="Pictures/10000000000003F70000016306B58C82CB0397DE.png" manifest:media-type="image/png"/>
  <manifest:file-entry manifest:full-path="Pictures/10000000000003BB000001394A0D25D06E6898C9.png" manifest:media-type="image/png"/>
  <manifest:file-entry manifest:full-path="Pictures/10000000000002F20000017F49C28E1C8FACE504.png" manifest:media-type="image/png"/>
  <manifest:file-entry manifest:full-path="Pictures/10000000000002F500000181A27355CFF1892832.png" manifest:media-type="image/png"/>
  <manifest:file-entry manifest:full-path="Pictures/10000000000002D2000001B737231B2800E38D31.png" manifest:media-type="image/png"/>
  <manifest:file-entry manifest:full-path="Pictures/10000000000003AD00000255D0A6936555858347.png" manifest:media-type="image/png"/>
  <manifest:file-entry manifest:full-path="Pictures/10000000000003E3000000F7DC4C7A35D7C356C7.png" manifest:media-type="image/png"/>
  <manifest:file-entry manifest:full-path="Pictures/10000000000003EA000002753210E1D8653C71B7.png" manifest:media-type="image/png"/>
  <manifest:file-entry manifest:full-path="Pictures/10000000000003CF0000003BA3DA8E776B7C8362.png" manifest:media-type="image/png"/>
  <manifest:file-entry manifest:full-path="Pictures/10000000000004390000032317EEDB9D6E7A96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ec0" officeooo:paragraph-rsid="0018fec0"/>
    </style:style>
    <style:style style:name="P2" style:family="paragraph" style:parent-style-name="Standard">
      <style:text-properties officeooo:rsid="0018fec0" officeooo:paragraph-rsid="001a4d97"/>
    </style:style>
    <style:style style:name="P3" style:family="paragraph" style:parent-style-name="Standard">
      <style:text-properties officeooo:rsid="001a4d97" officeooo:paragraph-rsid="001a4d97"/>
    </style:style>
    <style:style style:name="P4" style:family="paragraph" style:parent-style-name="Standard">
      <style:text-properties officeooo:rsid="001a4d97" officeooo:paragraph-rsid="001e16bf"/>
    </style:style>
    <style:style style:name="P5" style:family="paragraph" style:parent-style-name="Standard">
      <style:text-properties officeooo:rsid="001b4a24" officeooo:paragraph-rsid="001b4a24"/>
    </style:style>
    <style:style style:name="P6" style:family="paragraph" style:parent-style-name="Standard">
      <style:text-properties officeooo:rsid="001e16bf" officeooo:paragraph-rsid="001a4d97"/>
    </style:style>
    <style:style style:name="P7" style:family="paragraph" style:parent-style-name="Standard">
      <style:text-properties officeooo:rsid="001e16bf" officeooo:paragraph-rsid="001e16bf"/>
    </style:style>
    <style:style style:name="P8" style:family="paragraph" style:parent-style-name="Standard">
      <style:text-properties officeooo:rsid="001ff7f1" officeooo:paragraph-rsid="001ff7f1"/>
    </style:style>
    <style:style style:name="P9" style:family="paragraph" style:parent-style-name="Standard">
      <style:text-properties officeooo:rsid="0021c6e8" officeooo:paragraph-rsid="0021c6e8"/>
    </style:style>
    <style:style style:name="P10" style:family="paragraph" style:parent-style-name="Standard">
      <style:text-properties style:text-underline-style="solid" style:text-underline-width="auto" style:text-underline-color="font-color" officeooo:rsid="0021c6e8" officeooo:paragraph-rsid="0021c6e8"/>
    </style:style>
    <style:style style:name="P11" style:family="paragraph" style:parent-style-name="Standard">
      <style:text-properties officeooo:rsid="0025f2a5" officeooo:paragraph-rsid="0025f2a5"/>
    </style:style>
    <style:style style:name="P12" style:family="paragraph" style:parent-style-name="Standard">
      <style:text-properties officeooo:rsid="00269b36" officeooo:paragraph-rsid="00269b36"/>
    </style:style>
    <style:style style:name="T1" style:family="text">
      <style:text-properties officeooo:rsid="001b4a24"/>
    </style:style>
    <style:style style:name="T2" style:family="text">
      <style:text-properties officeooo:rsid="001cd2fa"/>
    </style:style>
    <style:style style:name="T3" style:family="text">
      <style:text-properties officeooo:rsid="001e16bf"/>
    </style:style>
    <style:style style:name="T4" style:family="text">
      <style:text-properties officeooo:rsid="001ff7f1"/>
    </style:style>
    <style:style style:name="T5" style:family="text">
      <style:text-properties officeooo:rsid="0025f2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Informe de phpMyAdmin</text:p>
      <text:p text:style-name="P1"/>
      <text:p text:style-name="P1">Iniciaremos los servicio de aparche y MyAdmin</text:p>
      <text:p text:style-name="P1"/>
      <text:p text:style-name="P3">Tendremos que estar en nuestro navegador con esta pagina</text:p>
      <text:p text:style-name="P1"/>
      <text:p text:style-name="P1"><draw:frame draw:style-name="fr4" draw:name="Imagen1" text:anchor-type="char" svg:width="17cm" svg:height="12.628cm" draw:z-index="0"><draw:image xlink:href="Pictures/10000000000004390000032317EEDB9D6E7A96FF.png" xlink:type="simple" xlink:show="embed" xlink:actuate="onLoad" draw:mime-type="image/png"/></draw:frame></text:p>
      <text:p text:style-name="Standard"/>
      <text:p text:style-name="P2">Poner una contraseña a root:</text:p>
      <text:p text:style-name="P2"/>
      <text:p text:style-name="P3">De manera predeterminada <text:span text:style-name="T1">el usuario</text:span> root esta sin contraseña, es<text:span text:style-name="T1">t</text:span>o pued<text:span text:style-name="T1">e</text:span> ocasionar fallo de seguridad, por ello debemos ponerle una contraseña</text:p>
      <text:p text:style-name="P3"/>
      <text:p text:style-name="P4">Seleccionamos la pestaña “Cuentas de usuarios”, <text:span text:style-name="T3">Nos saldrá el usuario root, </text:span><text:span text:style-name="T4">al seleccionar “Editar privilegios”</text:span></text:p>
      <text:p text:style-name="P4"/>
      <text:p text:style-name="P4"><text:s/></text:p>
      <text:p text:style-name="P4"/>
      <text:p text:style-name="P4"><draw:frame draw:style-name="fr1" draw:name="Imagen6" text:anchor-type="char" svg:width="17cm" svg:height="1.028cm" draw:z-index="5"><draw:image xlink:href="Pictures/10000000000003CF0000003BA3DA8E776B7C8362.png" xlink:type="simple" xlink:show="embed" xlink:actuate="onLoad" draw:mime-type="image/png"/></draw:frame></text:p>
      <text:p text:style-name="P4"/>
      <text:p text:style-name="P4"><text:soft-page-break/><text:span text:style-name="T4">E</text:span>n la parte de arriba tenemos la opción de cambiar contraseña. <text:span text:style-name="T1">Ponemos una nueva contraseña y hay que ponerla dos veces. Le damos a continuar.</text:span></text:p>
      <text:p text:style-name="P5"/>
      <text:p text:style-name="P5"/>
      <text:p text:style-name="P5"/>
      <text:p text:style-name="P5"/>
      <text:p text:style-name="P5"><draw:frame draw:style-name="fr4" draw:name="Imagen5" text:anchor-type="char" svg:width="17cm" svg:height="4.219cm" draw:z-index="4"><draw:image xlink:href="Pictures/10000000000003E3000000F7DC4C7A35D7C356C7.png" xlink:type="simple" xlink:show="embed" xlink:actuate="onLoad" draw:mime-type="image/png"/></draw:frame></text:p>
      <text:p text:style-name="P5"/>
      <text:p text:style-name="P5"/>
      <text:p text:style-name="P5"/>
      <text:p text:style-name="P5">Al hacer eso nos saldra un error en el navegador, ahora tenemos que modificar el php para poner la nueva contraseña.</text:p>
      <text:p text:style-name="P3"/>
      <text:p text:style-name="P3"/>
      <text:p text:style-name="P3"/>
      <text:p text:style-name="P3"/>
      <text:p text:style-name="P5">Vamos al panel de control, apretamos el boton de Config y selecionamos phpMyAdmin(config.inc.php)</text:p>
      <text:p text:style-name="P3"/>
      <text:p text:style-name="P3"><draw:frame draw:style-name="fr4" draw:name="Imagen2" text:anchor-type="char" svg:width="17cm" svg:height="10.336cm" draw:z-index="1"><draw:image xlink:href="Pictures/10000000000002D2000001B737231B2800E38D31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5">En la fila donde <text:span text:style-name="T2">esta la palabra ‘password’ tendré dos comillas vaciá [‘’], aquí es donde tenemos que poner la contraseña que hemos </text:span><text:span text:style-name="T3">creado</text:span></text:p>
      <text:p text:style-name="P5"/>
      <text:p text:style-name="P5"/>
      <text:p text:style-name="P5"/>
      <text:p text:style-name="P5"/>
      <text:p text:style-name="P5"/>
      <text:p text:style-name="P5"><draw:frame draw:style-name="fr4" draw:name="Imagen4" text:anchor-type="char" svg:width="17cm" svg:height="8.645cm" draw:z-index="3"><draw:image xlink:href="Pictures/10000000000002F500000181A27355CFF1892832.png" xlink:type="simple" xlink:show="embed" xlink:actuate="onLoad" draw:mime-type="image/png"/></draw:frame></text:p>
      <text:p text:style-name="P3"/>
      <text:p text:style-name="P3"><draw:frame draw:style-name="fr4" draw:name="Imagen3" text:anchor-type="char" svg:width="17cm" svg:height="8.634cm" draw:z-index="2"><draw:image xlink:href="Pictures/10000000000002F20000017F49C28E1C8FACE504.png" xlink:type="simple" xlink:show="embed" xlink:actuate="onLoad" draw:mime-type="image/png"/></draw:frame></text:p>
      <text:p text:style-name="P3"/>
      <text:p text:style-name="P6"/>
      <text:p text:style-name="P7">Con esto cambio realizado, <text:span text:style-name="T4">al actualizar la pagina ya no nos saldrá un error</text:span></text:p>
      <text:p text:style-name="P7"><text:soft-page-break/></text:p>
      <text:p text:style-name="P7"/>
      <text:p text:style-name="P7"/>
      <text:p text:style-name="P7"/>
      <text:p text:style-name="P8">Agregar un nuevo usuario:</text:p>
      <text:p text:style-name="P8"/>
      <text:p text:style-name="P8"/>
      <text:p text:style-name="P8">En la cuentas de usuario, vamos bajando hasta que veamos la opción de “Agregar cuenta de usuario”</text:p>
      <text:p text:style-name="P8"/>
      <text:p text:style-name="P8"><draw:frame draw:style-name="fr4" draw:name="Imagen7" text:anchor-type="char" svg:width="17cm" svg:height="5.944cm" draw:z-index="6"><draw:image xlink:href="Pictures/10000000000003F70000016306B58C82CB0397DE.png" xlink:type="simple" xlink:show="embed" xlink:actuate="onLoad" draw:mime-type="image/png"/></draw:frame></text:p>
      <text:p text:style-name="P8"/>
      <text:p text:style-name="P8"/>
      <text:p text:style-name="P8"><draw:frame draw:style-name="fr3" draw:name="Imagen8" text:anchor-type="char" svg:x="0.026cm" svg:y="0.337cm" svg:width="17cm" svg:height="10.848cm" draw:z-index="7"><draw:image xlink:href="Pictures/10000000000003EE00000282B8E4B65A1D64E025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<draw:frame draw:style-name="fr4" draw:name="Imagen9" text:anchor-type="char" svg:width="17cm" svg:height="9.608cm" draw:z-index="9"><draw:image xlink:href="Pictures/10000000000003FB00000240D4BE11771CE37B0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n10" text:anchor-type="char" svg:x="-0.609cm" svg:y="0.247cm" svg:width="17cm" svg:height="10.672cm" draw:z-index="8"><draw:image xlink:href="Pictures/10000000000003EA000002753210E1D8653C71B7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Pedir un Usuario:</text:p>
      <text:p text:style-name="P9"/>
      <text:p text:style-name="P9">De manera predeterminada no te pide Usuario el phpMyAdmin, <text:span text:style-name="T5">nos vamos al panel xampp, Apache , Config y seleccionamos la 5 opción</text:span></text:p>
      <text:p text:style-name="P9"/>
      <text:p text:style-name="P9"/>
      <text:p text:style-name="P9"/>
      <text:p text:style-name="P9"><draw:frame draw:style-name="fr3" draw:name="Imagen11" text:anchor-type="char" svg:x="-1.561cm" svg:y="0.363cm" svg:width="17cm" svg:height="10.336cm" draw:z-index="10"><draw:image xlink:href="Pictures/10000000000002D2000001B737231B2800E38D31.png" xlink:type="simple" xlink:show="embed" xlink:actuate="onLoad" draw:mime-type="image/png"/></draw:frame><text:soft-page-break/></text:p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En la linea donde esta entre corchete [‘auth_type’] nos sale <text:s/>entre comillas vació pues ponemos ‘http’.</text:p>
      <text:p text:style-name="P9"/>
      <text:p text:style-name="P9"/>
      <text:p text:style-name="P9"><draw:frame draw:style-name="fr2" draw:name="Imagen13" text:anchor-type="char" svg:width="16.028cm" svg:height="10.167cm" draw:z-index="12"><draw:image xlink:href="Pictures/10000000000003AD00000255D0A693655585834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12" text:anchor-type="char" svg:width="14.362cm" svg:height="7.294cm" draw:z-index="11"><draw:image xlink:href="Pictures/10000000000002F20000017F49C28E1C8FACE50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2">Ya nos pedirá el usuario y la contraseña<text:line-break/><text:line-break/></text:p>
      <text:p text:style-name="P12"><draw:frame draw:style-name="fr1" draw:name="Imagen14" text:anchor-type="char" svg:width="17cm" svg:height="5.57cm" draw:z-index="13"><draw:image xlink:href="Pictures/10000000000003BB000001394A0D25D06E6898C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5:22:28.131234408</meta:creation-date>
    <dc:date>2024-09-18T17:06:10.293145230</dc:date>
    <meta:editing-duration>PT9M49S</meta:editing-duration>
    <meta:editing-cycles>3</meta:editing-cycles>
    <meta:generator>LibreOffice/7.3.7.2$Linux_X86_64 LibreOffice_project/30$Build-2</meta:generator>
    <meta:document-statistic meta:table-count="0" meta:image-count="14" meta:object-count="0" meta:page-count="10" meta:paragraph-count="18" meta:word-count="227" meta:character-count="1385" meta:non-whitespace-character-count="1171"/>
  </office:meta>
</office:document-meta>
</file>